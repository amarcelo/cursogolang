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o instalar o Go no Windows e configurar o Delve passo a passo</text:h>
      <text:p text:style-name="P3">Por Antônio Marcelo</text:p>
      <text:p text:style-name="Text_20_body">Go é uma linguagem de programação moderna, simples e muito usada para criar APIs, servidores, ferramentas de linha de comando, sistemas distribuídos e aplicações em nuvem. Para programar em Go no Windows, precisamos instalar o compilador da linguagem e, para depurar programas, podemos instalar o Delve, também chamado de <text:span text:style-name="Source_20_Text">dlv</text:span>.</text:p>
      <text:h text:style-name="P5" text:outline-level="2">1. Baixando e instalando o Go</text:h>
      <text:p text:style-name="Text_20_body">O primeiro passo é acessar o site oficial da linguagem Go e baixar o instalador para Windows. O instalador oficial está disponível na página de downloads do projeto Go. (<text:a xlink:type="simple" xlink:href="https://go.dev/doc/install?utm_source=chatgpt.com" text:style-name="Internet_20_link" text:visited-style-name="Visited_20_Internet_20_Link">Go Dev</text:a>)</text:p>
      <text:p text:style-name="Text_20_body">Depois de baixar o arquivo <text:span text:style-name="Source_20_Text">.msi</text:span>, clique duas vezes nele e siga o assistente de instalação. Normalmente, basta avançar nas telas e manter as opções padrão.</text:p>
      <text:p text:style-name="Text_20_body">Após a instalação, abra o Prompt de Comando ou o PowerShell e digite:</text:p>
      <text:p text:style-name="P4"><text:span text:style-name="Source_20_Text">go version</text:span></text:p>
      <text:p text:style-name="Text_20_body">Se tudo estiver correto, o terminal mostrará a versão instalada do Go, por exemplo:</text:p>
      <text:p text:style-name="P4"><text:span text:style-name="Source_20_Text">go version go1.25.0 windows/amd64</text:span></text:p>
      <text:p text:style-name="Text_20_body">Isso confirma que o Go foi instalado e que o Windows consegue encontrar o comando <text:span text:style-name="Source_20_Text">go</text:span>.</text:p>
      <text:h text:style-name="P5" text:outline-level="2">2. Verificando o ambiente do Go</text:h>
      <text:p text:style-name="Text_20_body">Depois de instalar, podemos verificar algumas configurações com:</text:p>
      <text:p text:style-name="P4"><text:span text:style-name="Source_20_Text">go env</text:span></text:p>
      <text:p text:style-name="Text_20_body">Esse comando mostra várias informações do ambiente Go, como <text:span text:style-name="Source_20_Text">GOPATH</text:span>, <text:span text:style-name="Source_20_Text">GOROOT</text:span>, sistema operacional, arquitetura e local onde pacotes e ferramentas serão instalados.</text:p>
      <text:p text:style-name="Text_20_body">Um ponto importante é o diretório:</text:p>
      <text:p text:style-name="P4"><text:span text:style-name="Source_20_Text">%USERPROFILE%\go\bin</text:span></text:p>
      <text:p text:style-name="Text_20_body">É nesse local que ferramentas instaladas com <text:span text:style-name="Source_20_Text">go install</text:span> geralmente ficam no Windows.</text:p>
      <text:h text:style-name="P5" text:outline-level="2">3. Criando um primeiro projeto Go</text:h>
      <text:p text:style-name="Text_20_body">Agora vamos criar uma pasta para testar.</text:p>
      <text:p text:style-name="Text_20_body">No PowerShell ou Prompt de Comando, digite:</text:p>
      <text:p text:style-name="Preformatted_20_Text"><text:span text:style-name="Source_20_Text">mkdir aula-go</text:span></text:p>
      <text:p text:style-name="P4"><text:span text:style-name="Source_20_Text">cd aula-go</text:span></text:p>
      <text:p text:style-name="Text_20_body">Depois inicialize um módulo Go:</text:p>
      <text:p text:style-name="P4"><text:span text:style-name="Source_20_Text">go mod init aula-go</text:span></text:p>
      <text:p text:style-name="Text_20_body">Esse comando cria o arquivo <text:span text:style-name="Source_20_Text">go.mod</text:span>, responsável por identificar o projeto e gerenciar <text:soft-page-break/>dependências.</text:p>
      <text:p text:style-name="Text_20_body">Agora crie um arquivo chamado <text:span text:style-name="Source_20_Text">main.go</text:span> com o seguinte conteúdo:</text:p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"fmt"</text:span></text:p>
      <text:p text:style-name="Preformatted_20_Text"/>
      <text:p text:style-name="Preformatted_20_Text"><text:span text:style-name="Source_20_Text">func main() {</text:span></text:p>
      <text:p text:style-name="Preformatted_20_Text"><text:span text:style-name="Source_20_Text"><text:s text:c="8"/>fmt.Println("Olá Mundo!")</text:span></text:p>
      <text:p text:style-name="P4"><text:span text:style-name="Source_20_Text">}</text:span></text:p>
      <text:p text:style-name="Text_20_body">Para executar:</text:p>
      <text:p text:style-name="P4"><text:span text:style-name="Source_20_Text">go run main.go</text:span></text:p>
      <text:p text:style-name="Text_20_body">Se aparecer a mensagem abaixo, seu Go está funcionando:</text:p>
      <text:p text:style-name="P4"><text:span text:style-name="Source_20_Text">Olá Mundo!</text:span></text:p>
      <text:h text:style-name="P5" text:outline-level="2">4. O que é o Delve?</text:h>
      <text:p text:style-name="Text_20_body">Delve, ou <text:span text:style-name="Source_20_Text">dlv</text:span>, é o debugger usado para depurar programas escritos em Go. Ele permite colocar breakpoints, executar o código linha por linha, ver valores de variáveis e entender melhor o que está acontecendo dentro do programa. O próprio projeto Delve se define como um debugger para a linguagem Go. (<text:a xlink:type="simple" xlink:href="https://github.com/go-delve/delve?utm_source=chatgpt.com" text:style-name="Internet_20_link" text:visited-style-name="Visited_20_Internet_20_Link">GitHub</text:a>)</text:p>
      <text:p text:style-name="Text_20_body">Na prática, o Delve é muito útil quando o programa dá erro ou quando queremos entender o fluxo do código com mais calma.</text:p>
      <text:h text:style-name="P5" text:outline-level="2">5. Instalando o Delve no Windows</text:h>
      <text:p text:style-name="Text_20_body">Com o Go já instalado, instale o Delve com:</text:p>
      <text:p text:style-name="P4"><text:span text:style-name="Source_20_Text">go install github.com/go-delve/delve/cmd/dlv@latest</text:span></text:p>
      <text:p text:style-name="Text_20_body">Esse é o método indicado na documentação oficial do Delve para versões modernas do Go. (<text:a xlink:type="simple" xlink:href="https://github.com/go-delve/delve/blob/master/Documentation/installation/README.md?utm_source=chatgpt.com" text:style-name="Internet_20_link" text:visited-style-name="Visited_20_Internet_20_Link">GitHub</text:a>)</text:p>
      <text:p text:style-name="Text_20_body">Depois da instalação, teste:</text:p>
      <text:p text:style-name="P4"><text:span text:style-name="Source_20_Text">dlv version</text:span></text:p>
      <text:p text:style-name="Text_20_body">Se funcionar, aparecerá algo parecido com:</text:p>
      <text:p text:style-name="Preformatted_20_Text"><text:span text:style-name="Source_20_Text">Delve Debugger</text:span></text:p>
      <text:p text:style-name="P4"><text:span text:style-name="Source_20_Text">Version: ...</text:span></text:p>
      <text:h text:style-name="Heading_20_2" text:outline-level="2"><text:span text:style-name="T1">6. E se o comando </text:span><text:span text:style-name="Source_20_Text"><text:span text:style-name="T1">dlv</text:span></text:span><text:span text:style-name="T1"> não funcionar?</text:span></text:h>
      <text:p text:style-name="Text_20_body">Se aparecer uma mensagem dizendo que <text:span text:style-name="Source_20_Text">dlv</text:span> não é reconhecido, provavelmente o diretório onde o Go instala ferramentas não está no <text:span text:style-name="Source_20_Text">PATH</text:span> do Windows.</text:p>
      <text:p text:style-name="Text_20_body">Normalmente o Delve fica em:</text:p>
      <text:p text:style-name="P4"><text:span text:style-name="Source_20_Text">C:\Users\SEU_USUARIO\go\bin</text:span></text:p>
      <text:p text:style-name="Text_20_body">Para corrigir:</text:p>
      <text:list xml:id="list4478944804368187942" text:style-name="L1">
        <text:list-item>
          <text:p text:style-name="P1">Abra o menu Iniciar.</text:p>
        </text:list-item>
        <text:list-item>
          <text:p text:style-name="P1"><text:soft-page-break/>Pesquise por “variáveis de ambiente”.</text:p>
        </text:list-item>
        <text:list-item>
          <text:p text:style-name="P1">Clique em “Editar as variáveis de ambiente do sistema”.</text:p>
        </text:list-item>
        <text:list-item>
          <text:p text:style-name="P1">Clique em “Variáveis de Ambiente”.</text:p>
        </text:list-item>
        <text:list-item>
          <text:p text:style-name="P1">Em “Variáveis do usuário”, selecione <text:span text:style-name="Source_20_Text">Path</text:span>.</text:p>
        </text:list-item>
        <text:list-item>
          <text:p text:style-name="P1">Clique em “Editar”.</text:p>
        </text:list-item>
        <text:list-item>
          <text:p text:style-name="P1">Adicione este caminho:</text:p>
        </text:list-item>
      </text:list>
      <text:p text:style-name="P4"><text:span text:style-name="Source_20_Text">%USERPROFILE%\go\bin</text:span></text:p>
      <text:p text:style-name="Text_20_body">Depois feche e abra novamente o terminal.</text:p>
      <text:p text:style-name="Text_20_body">Teste de novo:</text:p>
      <text:p text:style-name="P4"><text:span text:style-name="Source_20_Text">dlv version</text:span></text:p>
      <text:h text:style-name="P5" text:outline-level="2">7. Usando o Delve pela linha de comando</text:h>
      <text:p text:style-name="Text_20_body">Dentro da pasta do seu projeto Go, execute:</text:p>
      <text:p text:style-name="P4"><text:span text:style-name="Source_20_Text">dlv debug</text:span></text:p>
      <text:p text:style-name="Text_20_body">O Delve vai compilar o programa e abrir um terminal próprio:</text:p>
      <text:p text:style-name="P4"><text:span text:style-name="Source_20_Text">(dlv)</text:span></text:p>
      <text:p text:style-name="Text_20_body">Alguns comandos úteis são:</text:p>
      <text:p text:style-name="P4"><text:span text:style-name="Source_20_Text">break main.main</text:span></text:p>
      <text:p text:style-name="Text_20_body">Cria um ponto de parada na função <text:span text:style-name="Source_20_Text">main</text:span>.</text:p>
      <text:p text:style-name="P4"><text:span text:style-name="Source_20_Text">continue</text:span></text:p>
      <text:p text:style-name="Text_20_body">Continua a execução do programa.</text:p>
      <text:p text:style-name="P4"><text:span text:style-name="Source_20_Text">next</text:span></text:p>
      <text:p text:style-name="Text_20_body">Executa a próxima linha.</text:p>
      <text:p text:style-name="P4"><text:span text:style-name="Source_20_Text">step</text:span></text:p>
      <text:p text:style-name="Text_20_body">Entra dentro de uma função.</text:p>
      <text:p text:style-name="P4"><text:span text:style-name="Source_20_Text">print nomeDaVariavel</text:span></text:p>
      <text:p text:style-name="Text_20_body">Mostra o valor de uma variável.</text:p>
      <text:p text:style-name="P4"><text:span text:style-name="Source_20_Text">exit</text:span></text:p>
      <text:p text:style-name="Text_20_body">Sai do Delve.</text:p>
      <text:h text:style-name="P5" text:outline-level="2">8. Instalando o VS Code para programar em Go</text:h>
      <text:p text:style-name="Text_20_body">Embora seja possível programar só pelo terminal, muitos alunos preferem usar o Visual Studio Code. Depois de instalar o VS Code, abra a aba de extensões e procure pela extensão oficial chamada “Go”. A documentação do VS Code informa que a extensão Go permite depurar programas utilizando o Delve. (<text:a xlink:type="simple" xlink:href="https://code.visualstudio.com/docs/languages/go?utm_source=chatgpt.com" text:style-name="Internet_20_link" text:visited-style-name="Visited_20_Internet_20_Link">Visual Studio Code</text:a>)</text:p>
      <text:p text:style-name="Text_20_body"><text:soft-page-break/>Depois de instalar a extensão, abra a pasta do projeto Go no VS Code.</text:p>
      <text:h text:style-name="P5" text:outline-level="2">9. Debugando Go no VS Code</text:h>
      <text:p text:style-name="Text_20_body">Abra o arquivo <text:span text:style-name="Source_20_Text">main.go</text:span>, clique ao lado do número de uma linha para criar um breakpoint e pressione <text:span text:style-name="Source_20_Text">F5</text:span>.</text:p>
      <text:p text:style-name="Text_20_body">Na primeira vez, o VS Code pode pedir para escolher uma configuração. Escolha algo como:</text:p>
      <text:p text:style-name="P4"><text:span text:style-name="Source_20_Text">Go: Launch Package</text:span></text:p>
      <text:p text:style-name="Text_20_body">A partir daí, o VS Code usará o Delve por trás para executar o programa em modo de debug.</text:p>
      <text:p text:style-name="Text_20_body">Durante o debug, você poderá:</text:p>
      <text:list xml:id="list1746575004666321548" text:style-name="L2">
        <text:list-item>
          <text:p text:style-name="P2">Pausar o programa em uma linha</text:p>
        </text:list-item>
        <text:list-item>
          <text:p text:style-name="P2">Ver o valor das variáveis</text:p>
        </text:list-item>
        <text:list-item>
          <text:p text:style-name="P2">Executar passo a passo</text:p>
        </text:list-item>
        <text:list-item>
          <text:p text:style-name="P2">Entender melhor o fluxo do código</text:p>
        </text:list-item>
        <text:list-item>
          <text:p text:style-name="P2">Encontrar erros com mais facilidade</text:p>
        </text:list-item>
      </text:list>
      <text:h text:style-name="P5" text:outline-level="2">10. Exemplo simples para testar o debug</text:h>
      <text:p text:style-name="Text_20_body">Use este programa:</text:p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"fmt"</text:span></text:p>
      <text:p text:style-name="Preformatted_20_Text"/>
      <text:p text:style-name="Preformatted_20_Text"><text:span text:style-name="Source_20_Text">func soma(a int, b int) int {</text:span></text:p>
      <text:p text:style-name="Preformatted_20_Text"><text:span text:style-name="Source_20_Text"><text:s text:c="8"/>return a + b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main() {</text:span></text:p>
      <text:p text:style-name="Preformatted_20_Text"><text:span text:style-name="Source_20_Text"><text:s text:c="8"/>x := 10</text:span></text:p>
      <text:p text:style-name="Preformatted_20_Text"><text:span text:style-name="Source_20_Text"><text:s text:c="8"/>y := 20</text:span></text:p>
      <text:p text:style-name="Preformatted_20_Text"/>
      <text:p text:style-name="Preformatted_20_Text"><text:span text:style-name="Source_20_Text"><text:s text:c="8"/>resultado := soma(x, y)</text:span></text:p>
      <text:p text:style-name="Preformatted_20_Text"/>
      <text:p text:style-name="Preformatted_20_Text"><text:span text:style-name="Source_20_Text"><text:s text:c="8"/>fmt.Println("Resultado:", resultado)</text:span></text:p>
      <text:p text:style-name="P4"><text:span text:style-name="Source_20_Text">}</text:span></text:p>
      <text:p text:style-name="Text_20_body">Coloque um breakpoint na linha:</text:p>
      <text:p text:style-name="P4"><text:span text:style-name="Source_20_Text">resultado := soma(x, y)</text:span></text:p>
      <text:p text:style-name="Text_20_body">Depois pressione <text:span text:style-name="Source_20_Text">F5</text:span>. O programa vai parar nessa linha, e você poderá ver os valores de <text:span text:style-name="Source_20_Text">x</text:span>, <text:span text:style-name="Source_20_Text">y</text:span> e <text:span text:style-name="Source_20_Text">resultado</text:span>.</text:p>
      <text:h text:style-name="Heading_20_2" text:outline-level="2"><text:span text:style-name="T1">Conclusão</text:span></text:h>
      <text:p text:style-name="Text_20_body">Para desenvolver em Go no Windows, o caminho básico é instalar o Go pelo site oficial, verificar com <text:span text:style-name="Source_20_Text">go version</text:span>, criar um projeto com <text:span text:style-name="Source_20_Text">go mod init</text:span> e executar com <text:span text:style-name="Source_20_Text">go run .</text:span>.</text:p>
      <text:p text:style-name="Text_20_body">Já o Delve é a ferramenta usada para depurar programas Go. Ele pode ser instalado com <text:span text:style-name="Source_20_Text">go install github.com/go-delve/delve/cmd/dlv@latest</text:span> e usado tanto pelo terminal quanto integrado ao VS Code.</text:p>
      <text:p text:style-name="Text_20_body"><text:soft-page-break/>Com Go, VS Code e Delve configurados, o aluno já tem um ambiente completo para estudar programação, criar APIs, testar códigos e entender melhor como seus programas funcionam por dentr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4S</meta:editing-duration>
    <meta:editing-cycles>4</meta:editing-cycles>
    <meta:generator>OpenOffice/4.1.14$Win32 OpenOffice.org_project/4114m1$Build-9811</meta:generator>
    <dc:date>2026-06-16T11:23:00.91</dc:date>
    <meta:document-statistic meta:table-count="0" meta:image-count="0" meta:object-count="0" meta:page-count="5" meta:paragraph-count="116" meta:word-count="954" meta:character-count="5617"/>
    <meta:user-defined meta:name="Info 1"/>
    <meta:user-defined meta:name="Info 2"/>
    <meta:user-defined meta:name="Info 3"/>
    <meta:user-defined meta:name="Info 4"/>
  </office:meta>
</office:document-meta>
</file>